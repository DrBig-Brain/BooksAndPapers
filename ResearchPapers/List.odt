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Foundations &amp; Basic Machine Learning Algorithms</text:h>
      <text:p text:style-name="P1">These cover linear models, trees, ensembles, SVMs, etc.</text:p>
      <text:list text:style-name="L1">
        <text:list-item>
          <text:p text:style-name="P2"><text:span text:style-name="Strong_20_Emphasis">Perceptron</text:span>: Frank Rosenblatt, "The Perceptron: A Probabilistic Model for Information Storage and Organization in the Brain" (1958). </text:p>
        </text:list-item>
        <text:list-item>
          <text:p text:style-name="P2"><text:span text:style-name="Strong_20_Emphasis">Decision Trees</text:span>: J.R. Quinlan, "Induction of Decision Trees" (1986) — foundational for ID3/C4.5. </text:p>
        </text:list-item>
        <text:list-item>
          <text:p text:style-name="P2"><text:span text:style-name="Strong_20_Emphasis">Random Forests</text:span>: Leo Breiman, "Random Forests" (2001). </text:p>
        </text:list-item>
        <text:list-item>
          <text:p text:style-name="P2"><text:span text:style-name="Strong_20_Emphasis">Gradient Boosting</text:span>: Jerome Friedman, "Greedy Function Approximation: A Gradient Boosting Machine" (2001); later XGBoost paper by Chen &amp; Guestrin (2016). </text:p>
        </text:list-item>
        <text:list-item>
          <text:p text:style-name="P2"><text:span text:style-name="Strong_20_Emphasis">Support Vector Machines</text:span>: Corinna Cortes &amp; Vladimir Vapnik, "Support-Vector Networks" (1995). </text:p>
        </text:list-item>
        <text:list-item>
          <text:p text:style-name="P2"><text:span text:style-name="Strong_20_Emphasis">AdaBoost</text:span>: Freund &amp; Schapire, "A Decision-Theoretic Generalization of On-Line Learning and an Application to Boosting" (1997). </text:p>
        </text:list-item>
        <text:list-item>
          <text:p text:style-name="P3"><text:span text:style-name="Strong_20_Emphasis">General Advice</text:span>: Pedro Domingos, "A Few Useful Things to Know About Machine Learning" (2012). </text:p>
        </text:list-item>
      </text:list>
      <text:p text:style-name="P1"><text:span text:style-name="Strong_20_Emphasis">Bonus</text:span>: EM Algorithm (Dempster et al., 1977), k-NN basics, and statistical learning theory (Vapnik's work).</text:p>
      <text:h text:style-name="Heading_20_3" text:outline-level="3">2. Deep Learning Fundamentals</text:h>
      <text:p text:style-name="P1">Core neural nets, optimization, regularization, and architectures.</text:p>
      <text:list text:style-name="L2">
        <text:list-item>
          <text:p text:style-name="P4"><text:span text:style-name="Strong_20_Emphasis">McCulloch-Pitts Neuron</text:span> (1943) &amp; Rosenblatt Perceptron (historical roots). </text:p>
        </text:list-item>
        <text:list-item>
          <text:p text:style-name="P4"><text:span text:style-name="Strong_20_Emphasis">Backpropagation</text:span>: Rumelhart, Hinton &amp; Williams, "Learning Representations by Back-Propagating Errors" (1986). </text:p>
        </text:list-item>
        <text:list-item>
          <text:p text:style-name="P4"><text:span text:style-name="Strong_20_Emphasis">Convolutional Nets</text:span>: LeCun et al., "Gradient-Based Learning Applied to Document Recognition" (LeNet, 1998). </text:p>
        </text:list-item>
        <text:list-item>
          <text:p text:style-name="P4"><text:span text:style-name="Strong_20_Emphasis">AlexNet</text:span>: Krizhevsky, Sutskever &amp; Hinton, "ImageNet Classification with Deep Convolutional Neural Networks" (2012) — ignited the modern DL boom. </text:p>
        </text:list-item>
        <text:list-item>
          <text:p text:style-name="P4"><text:span text:style-name="Strong_20_Emphasis">ResNet</text:span>: He et al., "Deep Residual Learning for Image Recognition" (2015) — solved deep training via skip connections. </text:p>
        </text:list-item>
        <text:list-item>
          <text:p text:style-name="P4"><text:span text:style-name="Strong_20_Emphasis">Batch Normalization</text:span>: Ioffe &amp; Szegedy (2015). </text:p>
        </text:list-item>
        <text:list-item>
          <text:p text:style-name="P4"><text:span text:style-name="Strong_20_Emphasis">Dropout</text:span>: Srivastava et al. (Hinton group), "Dropout: A Simple Way to Prevent Neural Networks from Overfitting" (2014). </text:p>
        </text:list-item>
        <text:list-item>
          <text:p text:style-name="P4"><text:span text:style-name="Strong_20_Emphasis">Adam Optimizer</text:span>: Kingma &amp; Ba, "Adam: A Method for Stochastic Optimization" (2014). </text:p>
        </text:list-item>
        <text:list-item>
          <text:p text:style-name="P5"><text:span text:style-name="Strong_20_Emphasis">GANs</text:span>: Ian Goodfellow et al., "Generative Adversarial Nets" (2014). </text:p>
        </text:list-item>
      </text:list>
      <text:p text:style-name="P1"><text:span text:style-name="Strong_20_Emphasis">Surveys/Overviews</text:span>: LeCun, Bengio &amp; Hinton, "Deep Learning" (Nature, 2015).</text:p>
      <text:h text:style-name="Heading_20_3" text:outline-level="3">3. NLP (Natural Language Processing)</text:h>
      <text:p text:style-name="P1">Word embeddings → sequence models → Transformers → LLMs.</text:p>
      <text:list text:style-name="L3">
        <text:list-item>
          <text:p text:style-name="P6"><text:soft-page-break/><text:span text:style-name="Strong_20_Emphasis">Word2Vec</text:span>: Mikolov et al., "Efficient Estimation of Word Representations in Vector Space" (2013). </text:p>
        </text:list-item>
        <text:list-item>
          <text:p text:style-name="P6"><text:span text:style-name="Strong_20_Emphasis">Seq2Seq</text:span>: Sutskever et al., "Sequence to Sequence Learning with Neural Networks" (2014). </text:p>
        </text:list-item>
        <text:list-item>
          <text:p text:style-name="P6"><text:span text:style-name="Strong_20_Emphasis">Attention</text:span>: Bahdanau et al. (2015) — additive attention. </text:p>
        </text:list-item>
        <text:list-item>
          <text:p text:style-name="P6"><text:span text:style-name="Strong_20_Emphasis">Transformer</text:span>: Vaswani et al., "<text:span text:style-name="Strong_20_Emphasis">Attention Is All You Need</text:span>" (2017) — the pivotal paper for modern NLP/LLMs. </text:p>
        </text:list-item>
        <text:list-item>
          <text:p text:style-name="P6"><text:span text:style-name="Strong_20_Emphasis">BERT</text:span>: Devlin et al., "BERT: Pre-training of Deep Bidirectional Transformers for Language Understanding" (2018). </text:p>
        </text:list-item>
        <text:list-item>
          <text:p text:style-name="P7"><text:span text:style-name="Strong_20_Emphasis">GPT Series</text:span>: Radford et al. (GPT-1, 2018); Brown et al. (GPT-3, 2020) — unsupervised pretraining and scaling. </text:p>
        </text:list-item>
      </text:list>
      <text:p text:style-name="P1"><text:span text:style-name="Strong_20_Emphasis">Others</text:span>: LSTM (Hochreiter &amp; Schmidhuber, 1997); GloVe; surveys on embeddings and pretraining.</text:p>
      <text:h text:style-name="Heading_20_3" text:outline-level="3">4. Computer Vision (CV)</text:h>
      <text:p text:style-name="P1">Object detection, segmentation, efficiency.</text:p>
      <text:list text:style-name="L4">
        <text:list-item>
          <text:p text:style-name="P8"><text:span text:style-name="Strong_20_Emphasis">LeNet</text:span> (above, 1998). </text:p>
        </text:list-item>
        <text:list-item>
          <text:p text:style-name="P8"><text:span text:style-name="Strong_20_Emphasis">AlexNet, VGG, Inception, ResNet</text:span> (see DL section). </text:p>
        </text:list-item>
        <text:list-item>
          <text:p text:style-name="P8"><text:span text:style-name="Strong_20_Emphasis">U-Net</text:span>: Ronneberger et al., "U-Net: Convolutional Networks for Biomedical Image Segmentation" (2015). </text:p>
        </text:list-item>
        <text:list-item>
          <text:p text:style-name="P8"><text:span text:style-name="Strong_20_Emphasis">Object Detection</text:span>: Girshick et al. (R-CNN, 2014); Ren et al. (Faster R-CNN, 2015); Redmon et al. (YOLO, 2016). </text:p>
        </text:list-item>
        <text:list-item>
          <text:p text:style-name="P9"><text:span text:style-name="Strong_20_Emphasis">Vision Transformers</text:span>: Dosovitskiy et al. (ViT, 2020) — applying Transformers to images. </text:p>
        </text:list-item>
      </text:list>
      <text:p text:style-name="P1"><text:span text:style-name="Strong_20_Emphasis">Foundational</text:span>: Hubel &amp; Wiesel receptive fields (1959, biology inspiration); SIFT (Lowe, 2004); HOG (Dalal &amp; Triggs).</text:p>
      <text:h text:style-name="Heading_20_3" text:outline-level="3">5. Additional Must-Reads for In-Depth Knowledge</text:h>
      <text:list text:style-name="L5">
        <text:list-item>
          <text:p text:style-name="P10"><text:span text:style-name="Strong_20_Emphasis">Optimization &amp; Generalization</text:span>: Bottou on SGD; papers on overfitting, bias-variance, PAC learning. </text:p>
        </text:list-item>
        <text:list-item>
          <text:p text:style-name="P10"><text:span text:style-name="Strong_20_Emphasis">Reinforcement Learning</text:span>: Foundational (e.g., Sutton &amp; Barto book + key papers); AlphaGo (Silver et al., 2016). </text:p>
        </text:list-item>
        <text:list-item>
          <text:p text:style-name="P10"><text:span text:style-name="Strong_20_Emphasis">Scaling &amp; LLMs</text:span>: Kaplan et al. (scaling laws); modern reasoning/RL papers (e.g., o1-style). </text:p>
        </text:list-item>
        <text:list-item>
          <text:p text:style-name="P10"><text:span text:style-name="Strong_20_Emphasis">Interpretability</text:span>: Various (e.g., LIME, SHAP concepts); "Peeking Inside the Black Box." </text:p>
        </text:list-item>
        <text:list-item>
          <text:p text:style-name="P11"><text:span text:style-name="Strong_20_Emphasis">Datasets</text:span>: ImageNet paper (2009); others for benchmark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3T13:40:51.470553043</meta:creation-date>
    <dc:date>2026-05-13T13:41:06.444361606</dc:date>
    <meta:editing-duration>PT16S</meta:editing-duration>
    <meta:editing-cycles>1</meta:editing-cycles>
    <meta:document-statistic meta:table-count="0" meta:image-count="0" meta:object-count="0" meta:page-count="2" meta:paragraph-count="45" meta:word-count="534" meta:character-count="3812" meta:non-whitespace-character-count="3317"/>
    <meta:generator>LibreOffice/26.2.2.2$Linux_X86_64 LibreOffice_project/620$Build-2</meta:generator>
  </office:meta>
</office:document-meta>
</file>